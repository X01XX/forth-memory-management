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85" officeooo:paragraph-rsid="00099485"/>
    </style:style>
    <style:style style:name="P2" style:family="paragraph" style:parent-style-name="Standard">
      <style:text-properties officeooo:rsid="00099485" officeooo:paragraph-rsid="000ad3a0"/>
    </style:style>
    <style:style style:name="P3" style:family="paragraph" style:parent-style-name="Standard">
      <style:text-properties officeooo:rsid="0015b610" officeooo:paragraph-rsid="0015b610"/>
    </style:style>
    <style:style style:name="P4" style:family="paragraph" style:parent-style-name="Standard">
      <style:text-properties officeooo:rsid="00099485" officeooo:paragraph-rsid="00099485"/>
    </style:style>
    <style:style style:name="P5" style:family="paragraph" style:parent-style-name="Standard">
      <style:text-properties officeooo:rsid="001c4cbd" officeooo:paragraph-rsid="001c4cbd"/>
    </style:style>
    <style:style style:name="P6" style:family="paragraph" style:parent-style-name="Standard">
      <style:text-properties officeooo:rsid="00192e7a" officeooo:paragraph-rsid="001c4cbd"/>
    </style:style>
    <style:style style:name="T1" style:family="text">
      <style:text-properties officeooo:rsid="000ad3a0"/>
    </style:style>
    <style:style style:name="T2" style:family="text">
      <style:text-properties officeooo:rsid="000e1c33"/>
    </style:style>
    <style:style style:name="T3" style:family="text">
      <style:text-properties officeooo:rsid="0010d57d"/>
    </style:style>
    <style:style style:name="T4" style:family="text">
      <style:text-properties officeooo:rsid="0011d587"/>
    </style:style>
    <style:style style:name="T5" style:family="text">
      <style:text-properties officeooo:rsid="001387d0"/>
    </style:style>
    <style:style style:name="T6" style:family="text">
      <style:text-properties officeooo:rsid="0015b610"/>
    </style:style>
    <style:style style:name="T7" style:family="text">
      <style:text-properties officeooo:rsid="00176f91"/>
    </style:style>
    <style:style style:name="T8" style:family="text">
      <style:text-properties officeooo:rsid="00192e7a"/>
    </style:style>
    <style:style style:name="T9" style:family="text">
      <style:text-properties officeooo:rsid="001bc2b3"/>
    </style:style>
    <style:style style:name="T10" style:family="text">
      <style:text-properties officeooo:rsid="001c4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1) </text:span><text:span text:style-name="T5">A</text:span>t the end of <text:span text:style-name="T5">a</text:span> program run, it <text:span text:style-name="T6">may </text:span>abort with <text:span text:style-name="T6">the message </text:span>“<text:span text:style-name="T6">Memory leaks found!</text:span>”, <text:span text:style-name="T8">see examlpe7.txt.</text:span></text:p>
      <text:p text:style-name="P1"/>
      <text:p text:style-name="P3">Struct instance types and addresses will be printed.</text:p>
      <text:p text:style-name="P1"/>
      <text:p text:style-name="P1"><text:span text:style-name="T6">A</text:span>dd a print statement in the &lt;<text:span text:style-name="T6">struct&gt;</text:span>-new function to print the address of each new <text:span text:style-name="T6">struct instance</text:span>.</text:p>
      <text:p text:style-name="P1"/>
      <text:p text:style-name="P1"/>
      <text:p text:style-name="P6"><text:span text:style-name="T10">2) W</text:span>ith a bad memory leak, the program will end with “stack-pop stack is empty”, <text:span text:style-name="T10">printing one address, </text:span>see example8.txt. </text:p>
      <text:p text:style-name="P6"/>
      <text:p text:style-name="P5">Add a print statement to all &lt;struct&gt;-new functions, re-run to find the struct type.</text:p>
      <text:p text:style-name="P1"/>
      <text:p text:style-name="P5">Then:</text:p>
      <text:p text:style-name="P5"/>
      <text:p text:style-name="P1">Using the Linux <text:span text:style-name="T3">shell command “</text:span><text:span text:style-name="T4">script”</text:span>, <text:span text:style-name="T1">save </text:span>the text of a session into a file.</text:p>
      <text:p text:style-name="P1"/>
      <text:p text:style-name="P3">Lo<text:span text:style-name="T9">o</text:span>k at the bottom of the text file, select a lost struct instance address.</text:p>
      <text:p text:style-name="P2"/>
      <text:p text:style-name="P3">Search for the last use of the address before the listing of the lost instance.</text:p>
      <text:p text:style-name="P3"/>
      <text:p text:style-name="P3">The Linux vi instruction allows a shift-n to search backwards from the lost instance address.</text:p>
      <text:p text:style-name="P1"/>
      <text:p text:style-name="P1">From <text:span text:style-name="T6">where the last une of the address occurs, and </text:span>other program output, <text:span text:style-name="T6">make a guess </text:span><text:s/><text:span text:style-name="T6">at where the allocation happens.</text:span></text:p>
      <text:p text:style-name="P1"/>
      <text:p text:style-name="P1"><text:span text:style-name="T6">A</text:span>dded print lines t<text:span text:style-name="T2">o</text:span> the starts and exits of functions, <text:span text:style-name="T6">to narrow down the location</text:span>.</text:p>
      <text:p text:style-name="P1"/>
      <text:p text:style-name="P3">A few program runs may be needed to find where the allocation happens.</text:p>
      <text:p text:style-name="P3"/>
      <text:p text:style-name="P3">Follow your code from there to find where the instance should be deallocated.</text:p>
      <text:p text:style-name="P1"/>
      <text:p text:style-name="P1"><text:span text:style-name="T6">5/</text:span><text:span text:style-name="T7">22</text:span><text:span text:style-name="T5">/</text:span>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56.848895213</meta:creation-date>
    <dc:date>2026-05-22T12:08:30.031348379</dc:date>
    <meta:editing-duration>PT25M53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201" meta:character-count="1149" meta:non-whitespace-character-count="961"/>
  </office:meta>
</office:document-meta>
</file>