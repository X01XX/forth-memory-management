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9485" officeooo:paragraph-rsid="00099485"/>
    </style:style>
    <style:style style:name="P2" style:family="paragraph" style:parent-style-name="Standard">
      <style:text-properties officeooo:rsid="00099485" officeooo:paragraph-rsid="000ad3a0"/>
    </style:style>
    <style:style style:name="P3" style:family="paragraph" style:parent-style-name="Standard">
      <style:text-properties officeooo:rsid="00099485" officeooo:paragraph-rsid="001d936b"/>
    </style:style>
    <style:style style:name="P4" style:family="paragraph" style:parent-style-name="Standard">
      <style:text-properties officeooo:rsid="0015b610" officeooo:paragraph-rsid="0015b610"/>
    </style:style>
    <style:style style:name="P5" style:family="paragraph" style:parent-style-name="Standard">
      <style:text-properties officeooo:rsid="001c4cbd" officeooo:paragraph-rsid="001c4cbd"/>
    </style:style>
    <style:style style:name="P6" style:family="paragraph" style:parent-style-name="Standard">
      <style:text-properties officeooo:rsid="00192e7a" officeooo:paragraph-rsid="001c4cbd"/>
    </style:style>
    <style:style style:name="T1" style:family="text">
      <style:text-properties officeooo:rsid="000ad3a0"/>
    </style:style>
    <style:style style:name="T2" style:family="text">
      <style:text-properties officeooo:rsid="000e1c33"/>
    </style:style>
    <style:style style:name="T3" style:family="text">
      <style:text-properties officeooo:rsid="0010d57d"/>
    </style:style>
    <style:style style:name="T4" style:family="text">
      <style:text-properties officeooo:rsid="0011d587"/>
    </style:style>
    <style:style style:name="T5" style:family="text">
      <style:text-properties officeooo:rsid="001387d0"/>
    </style:style>
    <style:style style:name="T6" style:family="text">
      <style:text-properties officeooo:rsid="0015b610"/>
    </style:style>
    <style:style style:name="T7" style:family="text">
      <style:text-properties officeooo:rsid="00176f91"/>
    </style:style>
    <style:style style:name="T8" style:family="text">
      <style:text-properties officeooo:rsid="00192e7a"/>
    </style:style>
    <style:style style:name="T9" style:family="text">
      <style:text-properties officeooo:rsid="001bc2b3"/>
    </style:style>
    <style:style style:name="T10" style:family="text">
      <style:text-properties officeooo:rsid="001c4cbd"/>
    </style:style>
    <style:style style:name="T11" style:family="text">
      <style:text-properties officeooo:rsid="001cfd59"/>
    </style:style>
    <style:style style:name="T12" style:family="text">
      <style:text-properties officeooo:rsid="001d936b"/>
    </style:style>
    <style:style style:name="T13" style:family="text">
      <style:text-properties officeooo:rsid="001f01fb"/>
    </style:style>
    <style:style style:name="T14" style:family="text">
      <style:text-properties officeooo:rsid="001f51f5"/>
    </style:style>
    <style:style style:name="T15" style:family="text">
      <style:text-properties officeooo:rsid="0020e5de"/>
    </style:style>
    <style:style style:name="T16" style:family="text">
      <style:text-properties officeooo:rsid="002273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0">1) </text:span><text:span text:style-name="T5">A</text:span>t the end of <text:span text:style-name="T5">a</text:span> program run, it <text:span text:style-name="T6">may </text:span>abort with <text:span text:style-name="T6">the message </text:span>“<text:span text:style-name="T6">Memory leaks found!</text:span>”, <text:span text:style-name="T8">see examlpe7.txt.</text:span></text:p>
      <text:p text:style-name="P1"/>
      <text:p text:style-name="P4">Struct instance types and addresses will be printed.</text:p>
      <text:p text:style-name="P1"/>
      <text:p text:style-name="P1"><text:span text:style-name="T6">A</text:span>dd a print statement in the <text:span text:style-name="T12">selected </text:span>&lt;<text:span text:style-name="T6">struct&gt;</text:span>-new function to print the address of each new <text:span text:style-name="T6">struct instance</text:span>.</text:p>
      <text:p text:style-name="P1"/>
      <text:p text:style-name="P1"/>
      <text:p text:style-name="P6"><text:span text:style-name="T10">2) W</text:span>ith a bad memory leak, the program will end with “stack-pop stack is empty”, <text:span text:style-name="T10">printing one address </text:span><text:span text:style-name="T15">and the first word</text:span><text:span text:style-name="T10">, </text:span>see example8.txt. </text:p>
      <text:p text:style-name="P6"/>
      <text:p text:style-name="P5"><text:span text:style-name="T15">If you are not using the first word as a struct ID, a</text:span>dd a <text:span text:style-name="T11">struct name </text:span>print statement to all &lt;struct&gt;-new functions, re-run to find the struct type.</text:p>
      <text:p text:style-name="P5"/>
      <text:p text:style-name="P3"><text:span text:style-name="T6">A</text:span>dd a print statement in the <text:span text:style-name="T12">selected </text:span>&lt;<text:span text:style-name="T6">struct&gt;</text:span>-new function to print the address of each new <text:span text:style-name="T6">struct instance</text:span>.</text:p>
      <text:p text:style-name="P1"/>
      <text:p text:style-name="P1"/>
      <text:p text:style-name="P5">Then:</text:p>
      <text:p text:style-name="P5"/>
      <text:p text:style-name="P1">Using the Linux <text:span text:style-name="T3">shell command “</text:span><text:span text:style-name="T4">script”</text:span>, <text:span text:style-name="T1">save </text:span>the text of a session into a file.</text:p>
      <text:p text:style-name="P1"/>
      <text:p text:style-name="P4">Lo<text:span text:style-name="T9">o</text:span>k at the bottom of the text file, select a lost struct instance address.</text:p>
      <text:p text:style-name="P2"/>
      <text:p text:style-name="P4">Search for the last use of the address before the listing of the lost instance.</text:p>
      <text:p text:style-name="P4"/>
      <text:p text:style-name="P4">The Linux “vi” <text:span text:style-name="T13">program</text:span> allows a shift-n to search backwards from the lost instance address.</text:p>
      <text:p text:style-name="P1"/>
      <text:p text:style-name="P1">From <text:span text:style-name="T6">where the last u</text:span><text:span text:style-name="T14">s</text:span><text:span text:style-name="T6">e of the address occurs, and </text:span>other program output, <text:span text:style-name="T6">make a guess </text:span><text:s/><text:span text:style-name="T6">at where the allocation happens.</text:span></text:p>
      <text:p text:style-name="P1"/>
      <text:p text:style-name="P1"><text:span text:style-name="T6">A</text:span>dd print lines t<text:span text:style-name="T2">o</text:span> the starts and exits of functions, <text:span text:style-name="T6">to narrow down the location</text:span>.</text:p>
      <text:p text:style-name="P1"/>
      <text:p text:style-name="P4">A few program runs may be needed to find where the allocation happens.</text:p>
      <text:p text:style-name="P4"/>
      <text:p text:style-name="P4">Follow your code from there to find where the instance should be deallocated.</text:p>
      <text:p text:style-name="P1"/>
      <text:p text:style-name="P1"><text:span text:style-name="T6">5/</text:span><text:span text:style-name="T7">2</text:span><text:span text:style-name="T16">3</text:span><text:span text:style-name="T5">/</text:span>2026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3T19:08:56.848895213</meta:creation-date>
    <dc:date>2026-05-23T23:55:04.674210287</dc:date>
    <meta:editing-duration>PT33M56S</meta:editing-duration>
    <meta:editing-cycles>21</meta:editing-cycles>
    <meta:generator>LibreOffice/24.2.7.2$Linux_X86_64 LibreOffice_project/420$Build-2</meta:generator>
    <meta:document-statistic meta:table-count="0" meta:image-count="0" meta:object-count="0" meta:page-count="1" meta:paragraph-count="16" meta:word-count="238" meta:character-count="1346" meta:non-whitespace-character-count="1122"/>
  </office:meta>
</office:document-meta>
</file>